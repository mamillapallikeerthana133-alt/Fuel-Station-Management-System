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328d" officeooo:paragraph-rsid="000c328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c328d" officeooo:paragraph-rsid="000c32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FUEL STATION MANAGEMENT SYSTEM</text:p>
      <text:p text:style-name="P2"/>
      <text:p text:style-name="Standard">CREATE DATABASE FuelStationDB;</text:p>
      <text:p text:style-name="Standard"/>
      <text:p text:style-name="Standard"/>
      <text:p text:style-name="Standard">USE FuelStationDB;</text:p>
      <text:p text:style-name="Standard"/>
      <text:p text:style-name="Standard"/>
      <text:p text:style-name="Standard">CREATE TABLE Customers (</text:p>
      <text:p text:style-name="Standard"><text:s text:c="4"/>CustomerID INT PRIMARY KEY AUTO_INCREMENT,</text:p>
      <text:p text:style-name="Standard"><text:s text:c="4"/>CustomerName VARCHAR(100),</text:p>
      <text:p text:style-name="Standard"><text:s text:c="4"/>Phone VARCHAR(15),</text:p>
      <text:p text:style-name="Standard"><text:s text:c="4"/>City VARCHAR(50)</text:p>
      <text:p text:style-name="Standard">);</text:p>
      <text:p text:style-name="Standard"/>
      <text:p text:style-name="Standard">INSERT INTO Customers (CustomerName, Phone, City) VALUES</text:p>
      <text:p text:style-name="Standard">('Karthik Basavaraj Chikkamath', '9876543210', 'Hyderabad'),</text:p>
      <text:p text:style-name="Standard">('Siva Charan Sai', '9876543211', 'Bangalore'),</text:p>
      <text:p text:style-name="Standard">('Vamsidhar Reddy', '9876543212', 'Vijayawada'),</text:p>
      <text:p text:style-name="Standard">('Sai Charan Reddy', '9876543213', 'Chennai'),</text:p>
      <text:p text:style-name="Standard">('Keerthana', '9876543214', 'Hyderabad'),</text:p>
      <text:p text:style-name="Standard">('Rahul Sharma', '9876543215', 'Mumbai'),</text:p>
      <text:p text:style-name="Standard">('Priya Nair', '9876543216', 'Kochi'),</text:p>
      <text:p text:style-name="Standard">('Arjun Verma', '9876543217', 'Delhi'),</text:p>
      <text:p text:style-name="Standard">('Sneha Patil', '9876543218', 'Pune'),</text:p>
      <text:p text:style-name="Standard">('Rohit Kumar', '9876543219', 'Nagpur');</text:p>
      <text:p text:style-name="Standard"/>
      <text:p text:style-name="Standard"/>
      <text:p text:style-name="Standard">CREATE TABLE Employees (</text:p>
      <text:p text:style-name="Standard"><text:s text:c="4"/>EmployeeID INT PRIMARY KEY AUTO_INCREMENT,</text:p>
      <text:p text:style-name="Standard"><text:s text:c="4"/>EmployeeName VARCHAR(100),</text:p>
      <text:p text:style-name="Standard"><text:s text:c="4"/>Position VARCHAR(50),</text:p>
      <text:p text:style-name="Standard"><text:s text:c="4"/>Salary DECIMAL(10,2)</text:p>
      <text:p text:style-name="Standard">);</text:p>
      <text:p text:style-name="Standard"/>
      <text:p text:style-name="Standard">INSERT INTO Employees (EmployeeName, Position, Salary) VALUES</text:p>
      <text:p text:style-name="Standard">('Akhil Reddy', 'Manager', 50000),</text:p>
      <text:p text:style-name="Standard">('Naveen Kumar', 'Cashier', 25000),</text:p>
      <text:p text:style-name="Standard">('Harsha Vardhan', 'Pump Operator', 22000),</text:p>
      <text:p text:style-name="Standard">('Manoj Sai', 'Supervisor', 35000),</text:p>
      <text:p text:style-name="Standard">('Deepika Rao', 'Accountant', 40000),</text:p>
      <text:p text:style-name="Standard">('Vinay Kumar', 'Cleaner', 18000),</text:p>
      <text:p text:style-name="Standard">('Pooja Sharma', 'Cashier', 26000),</text:p>
      <text:p text:style-name="Standard">('Ajay Verma', 'Security', 20000),</text:p>
      <text:p text:style-name="Standard">('Lakshmi Priya', 'Manager', 55000),</text:p>
      <text:p text:style-name="Standard">('Teja Krishna', 'Pump Operator', 23000);</text:p>
      <text:p text:style-name="Standard"/>
      <text:p text:style-name="Standard"/>
      <text:p text:style-name="Standard">CREATE TABLE Fuel (</text:p>
      <text:p text:style-name="Standard"><text:s text:c="4"/>FuelID INT PRIMARY KEY AUTO_INCREMENT,</text:p>
      <text:p text:style-name="Standard"><text:soft-page-break/><text:s text:c="4"/>FuelType VARCHAR(50),</text:p>
      <text:p text:style-name="Standard"><text:s text:c="4"/>PricePerLiter DECIMAL(5,2),</text:p>
      <text:p text:style-name="Standard"><text:s text:c="4"/>AvailableStock INT</text:p>
      <text:p text:style-name="Standard">);</text:p>
      <text:p text:style-name="Standard"/>
      <text:p text:style-name="Standard">INSERT INTO Fuel (FuelType, PricePerLiter, AvailableStock) VALUES</text:p>
      <text:p text:style-name="Standard">('Petrol', 105.50, 5000),</text:p>
      <text:p text:style-name="Standard">('Diesel', 95.20, 6000),</text:p>
      <text:p text:style-name="Standard">('CNG', 80.00, 3000),</text:p>
      <text:p text:style-name="Standard">('Petrol Premium', 112.40, 2000),</text:p>
      <text:p text:style-name="Standard">('Diesel Premium', 101.30, 2500),</text:p>
      <text:p text:style-name="Standard">('EV Charging', 20.00, 1000),</text:p>
      <text:p text:style-name="Standard">('Bio Diesel', 90.50, 1500),</text:p>
      <text:p text:style-name="Standard">('LPG', 85.00, 3500),</text:p>
      <text:p text:style-name="Standard">('Petrol Extra', 108.90, 1800),</text:p>
      <text:p text:style-name="Standard">('Turbo Diesel', 99.99, 2200);</text:p>
      <text:p text:style-name="Standard"/>
      <text:p text:style-name="Standard"/>
      <text:p text:style-name="Standard">CREATE TABLE Suppliers (</text:p>
      <text:p text:style-name="Standard"><text:s text:c="4"/>SupplierID INT PRIMARY KEY AUTO_INCREMENT,</text:p>
      <text:p text:style-name="Standard"><text:s text:c="4"/>SupplierName VARCHAR(100),</text:p>
      <text:p text:style-name="Standard"><text:s text:c="4"/>Contact VARCHAR(15),</text:p>
      <text:p text:style-name="Standard"><text:s text:c="4"/>FuelSupplied VARCHAR(50)</text:p>
      <text:p text:style-name="Standard">);</text:p>
      <text:p text:style-name="Standard"/>
      <text:p text:style-name="Standard">INSERT INTO Suppliers (SupplierName, Contact, FuelSupplied) VALUES</text:p>
      <text:p text:style-name="Standard">('Indian Oil', '9000000001', 'Petrol'),</text:p>
      <text:p text:style-name="Standard">('Bharat Petroleum', '9000000002', 'Diesel'),</text:p>
      <text:p text:style-name="Standard">('HP Gas', '9000000003', 'CNG'),</text:p>
      <text:p text:style-name="Standard">('Reliance Fuel', '9000000004', 'Petrol Premium'),</text:p>
      <text:p text:style-name="Standard">('Shell India', '9000000005', 'Diesel Premium'),</text:p>
      <text:p text:style-name="Standard">('Green Fuel Ltd', '9000000006', 'Bio Diesel'),</text:p>
      <text:p text:style-name="Standard">('Energy Corp', '9000000007', 'EV Charging'),</text:p>
      <text:p text:style-name="Standard">('FuelMax', '9000000008', 'LPG'),</text:p>
      <text:p text:style-name="Standard">('National Fuel', '9000000009', 'Turbo Diesel'),</text:p>
      <text:p text:style-name="Standard">('FastFuel', '9000000010', 'Petrol Extra');</text:p>
      <text:p text:style-name="Standard"/>
      <text:p text:style-name="Standard"/>
      <text:p text:style-name="Standard">CREATE TABLE Payments (</text:p>
      <text:p text:style-name="Standard"><text:s text:c="4"/>PaymentID INT PRIMARY KEY AUTO_INCREMENT,</text:p>
      <text:p text:style-name="Standard"><text:s text:c="4"/>CustomerID INT,</text:p>
      <text:p text:style-name="Standard"><text:s text:c="4"/>Amount DECIMAL(10,2),</text:p>
      <text:p text:style-name="Standard"><text:s text:c="4"/>PaymentMode VARCHAR(50),</text:p>
      <text:p text:style-name="Standard"><text:s text:c="4"/>FOREIGN KEY (CustomerID) REFERENCES Customers(CustomerID)</text:p>
      <text:p text:style-name="Standard">);</text:p>
      <text:p text:style-name="Standard"/>
      <text:p text:style-name="Standard">INSERT INTO Payments (CustomerID, Amount, PaymentMode) VALUES</text:p>
      <text:p text:style-name="Standard">(1, 2500, 'UPI'),</text:p>
      <text:p text:style-name="Standard">(2, 1800, 'Cash'),</text:p>
      <text:p text:style-name="Standard">(3, 3200, 'Card'),</text:p>
      <text:p text:style-name="Standard">(4, 1500, 'UPI'),</text:p>
      <text:p text:style-name="Standard">(5, 4100, 'Cash'),</text:p>
      <text:p text:style-name="Standard"><text:soft-page-break/>(6, 2200, 'Card'),</text:p>
      <text:p text:style-name="Standard">(7, 2750, 'UPI'),</text:p>
      <text:p text:style-name="Standard">(8, 1900, 'Cash'),</text:p>
      <text:p text:style-name="Standard">(9, 3600, 'Card'),</text:p>
      <text:p text:style-name="Standard">(10, 2900, 'UPI');</text:p>
      <text:p text:style-name="Standard"/>
      <text:p text:style-name="Standard"/>
      <text:p text:style-name="Standard">CREATE TABLE Sales (</text:p>
      <text:p text:style-name="Standard"><text:s text:c="4"/>SaleID INT PRIMARY KEY AUTO_INCREMENT,</text:p>
      <text:p text:style-name="Standard"><text:s text:c="4"/>CustomerID INT,</text:p>
      <text:p text:style-name="Standard"><text:s text:c="4"/>FuelID INT,</text:p>
      <text:p text:style-name="Standard"><text:s text:c="4"/>Quantity INT,</text:p>
      <text:p text:style-name="Standard"><text:s text:c="4"/>TotalAmount DECIMAL(10,2),</text:p>
      <text:p text:style-name="Standard"><text:s text:c="4"/>FOREIGN KEY (CustomerID) REFERENCES Customers(CustomerID),</text:p>
      <text:p text:style-name="Standard"><text:s text:c="4"/>FOREIGN KEY (FuelID) REFERENCES Fuel(FuelID)</text:p>
      <text:p text:style-name="Standard">);</text:p>
      <text:p text:style-name="Standard"/>
      <text:p text:style-name="Standard">INSERT INTO Sales (CustomerID, FuelID, Quantity, TotalAmount) VALUES</text:p>
      <text:p text:style-name="Standard">(1, 1, 20, 2110),</text:p>
      <text:p text:style-name="Standard">(2, 2, 15, 1428),</text:p>
      <text:p text:style-name="Standard">(3, 3, 10, 800),</text:p>
      <text:p text:style-name="Standard">(4, 4, 18, 2023),</text:p>
      <text:p text:style-name="Standard">(5, 5, 22, 2228),</text:p>
      <text:p text:style-name="Standard">(6, 6, 30, 600),</text:p>
      <text:p text:style-name="Standard">(7, 7, 12, 1086),</text:p>
      <text:p text:style-name="Standard">(8, 8, 25, 2125),</text:p>
      <text:p text:style-name="Standard">(9, 9, 14, 1524),</text:p>
      <text:p text:style-name="Standard">(10, 10, 16, 1599);</text:p>
      <text:p text:style-name="Standard"/>
      <text:p text:style-name="Standard">CREATE TABLE Vehicles (</text:p>
      <text:p text:style-name="Standard"><text:s text:c="4"/>VehicleID INT PRIMARY KEY AUTO_INCREMENT,</text:p>
      <text:p text:style-name="Standard"><text:s text:c="4"/>CustomerID INT,</text:p>
      <text:p text:style-name="Standard"><text:s text:c="4"/>VehicleType VARCHAR(50),</text:p>
      <text:p text:style-name="Standard"><text:s text:c="4"/>VehicleNumber VARCHAR(20),</text:p>
      <text:p text:style-name="Standard"><text:s text:c="4"/>FOREIGN KEY (CustomerID) REFERENCES Customers(CustomerID)</text:p>
      <text:p text:style-name="Standard">);</text:p>
      <text:p text:style-name="Standard"/>
      <text:p text:style-name="Standard">INSERT INTO Vehicles (CustomerID, VehicleType, VehicleNumber) VALUES</text:p>
      <text:p text:style-name="Standard">(1, 'Bike', 'TS01AB1234'),</text:p>
      <text:p text:style-name="Standard">(2, 'Car', 'KA02CD5678'),</text:p>
      <text:p text:style-name="Standard">(3, 'Truck', 'AP03EF9101'),</text:p>
      <text:p text:style-name="Standard">(4, 'Bus', 'TN04GH2345'),</text:p>
      <text:p text:style-name="Standard">(5, 'SUV', 'TS05IJ6789'),</text:p>
      <text:p text:style-name="Standard">(6, 'Bike', 'MH06KL1111'),</text:p>
      <text:p text:style-name="Standard">(7, 'Car', 'KL07MN2222'),</text:p>
      <text:p text:style-name="Standard">(8, 'Truck', 'DL08OP3333'),</text:p>
      <text:p text:style-name="Standard">(9, 'SUV', 'AP09QR4444'),</text:p>
      <text:p text:style-name="Standard">(10, 'Bus', 'KA10ST5555');</text:p>
      <text:p text:style-name="Standard"/>
      <text:p text:style-name="Standard"/>
      <text:p text:style-name="Standard">CREATE TABLE Stock (</text:p>
      <text:p text:style-name="Standard"><text:s text:c="4"/>StockID INT PRIMARY KEY AUTO_INCREMENT,</text:p>
      <text:p text:style-name="Standard"><text:soft-page-break/><text:s text:c="4"/>FuelID INT,</text:p>
      <text:p text:style-name="Standard"><text:s text:c="4"/>StockIn INT,</text:p>
      <text:p text:style-name="Standard"><text:s text:c="4"/>StockOut INT,</text:p>
      <text:p text:style-name="Standard"><text:s text:c="4"/>RemainingStock INT,</text:p>
      <text:p text:style-name="Standard"><text:s text:c="4"/>FOREIGN KEY (FuelID) REFERENCES Fuel(FuelID)</text:p>
      <text:p text:style-name="Standard">);</text:p>
      <text:p text:style-name="Standard"/>
      <text:p text:style-name="Standard">INSERT INTO Stock (FuelID, StockIn, StockOut, RemainingStock) VALUES</text:p>
      <text:p text:style-name="Standard">(1, 5000, 1000, 4000),</text:p>
      <text:p text:style-name="Standard">(2, 6000, 1500, 4500),</text:p>
      <text:p text:style-name="Standard">(3, 3000, 700, 2300),</text:p>
      <text:p text:style-name="Standard">(4, 2000, 500, 1500),</text:p>
      <text:p text:style-name="Standard">(5, 2500, 600, 1900),</text:p>
      <text:p text:style-name="Standard">(6, 1000, 200, 800),</text:p>
      <text:p text:style-name="Standard">(7, 1500, 300, 1200),</text:p>
      <text:p text:style-name="Standard">(8, 3500, 900, 2600),</text:p>
      <text:p text:style-name="Standard">(9, 1800, 400, 1400),</text:p>
      <text:p text:style-name="Standard">(10, 2200, 500, 1700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2:36:41.660349300</meta:creation-date>
    <dc:date>2026-05-21T12:38:09.752663500</dc:date>
    <meta:editing-duration>PT1M29S</meta:editing-duration>
    <meta:editing-cycles>1</meta:editing-cycles>
    <meta:generator>LibreOffice/25.8.6.2$Windows_X86_64 LibreOffice_project/b4b39682cd9868fa725bc664aff94278d315bd04</meta:generator>
    <meta:document-statistic meta:table-count="0" meta:image-count="0" meta:object-count="0" meta:page-count="4" meta:paragraph-count="146" meta:word-count="529" meta:character-count="4354" meta:non-whitespace-character-count="3815"/>
  </office:meta>
</office:document-meta>
</file>